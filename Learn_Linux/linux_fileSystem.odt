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7653in"/>
    </style:style>
    <style:style style:name="Table1.B" style:family="table-column">
      <style:table-column-properties style:column-width="3.3597in"/>
    </style:style>
    <style:style style:name="Table1.C" style:family="table-column">
      <style:table-column-properties style:column-width="2.5681in"/>
    </style:style>
    <style:style style:name="Table1.A1" style:family="table-cell">
      <style:table-cell-properties style:vertical-align="middle" fo:padding="0.0194in" fo:border="none"/>
    </style:style>
    <style:style style:name="Table1.3" style:family="table-row">
      <style:table-row-properties style:min-row-height="0.8889in"/>
    </style:style>
    <style:style style:name="Table1.5" style:family="table-row">
      <style:table-row-properties style:min-row-height="0.9111in"/>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officeooo:rsid="001127bc" officeooo:paragraph-rsid="001127bc"/>
    </style:style>
    <style:style style:name="P5" style:family="paragraph" style:parent-style-name="Heading_20_3">
      <style:text-properties officeooo:rsid="001127bc" officeooo:paragraph-rsid="001127bc"/>
    </style:style>
    <style:style style:name="P6" style:family="paragraph" style:parent-style-name="Text_20_body" style:list-style-name="L4">
      <style:text-properties officeooo:rsid="001127bc"/>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Standard">
      <style:text-properties officeooo:rsid="00132612" officeooo:paragraph-rsid="00132612"/>
    </style:style>
    <style:style style:name="P11" style:family="paragraph" style:parent-style-name="Heading_20_1">
      <style:text-properties officeooo:rsid="00132612" officeooo:paragraph-rsid="00132612"/>
    </style:style>
    <style:style style:name="P12" style:family="paragraph" style:parent-style-name="Text_20_body">
      <style:text-properties officeooo:rsid="00132612"/>
    </style:style>
    <style:style style:name="P13" style:family="paragraph" style:parent-style-name="Text_20_body">
      <style:text-properties officeooo:rsid="00132612" officeooo:paragraph-rsid="00132612"/>
    </style:style>
    <style:style style:name="P14" style:family="paragraph" style:parent-style-name="Text_20_body" style:list-style-name="L8">
      <style:text-properties officeooo:rsid="00132612"/>
    </style:style>
    <style:style style:name="P15" style:family="paragraph" style:parent-style-name="Horizontal_20_Line">
      <style:text-properties officeooo:rsid="00132612"/>
    </style:style>
    <style:style style:name="P16" style:family="paragraph" style:parent-style-name="Heading_20_1">
      <style:text-properties officeooo:rsid="00132612"/>
    </style:style>
    <style:style style:name="P17" style:family="paragraph" style:parent-style-name="Text_20_body" style:list-style-name="L9">
      <style:text-properties officeooo:rsid="00132612"/>
    </style:style>
    <style:style style:name="P18" style:family="paragraph" style:parent-style-name="Text_20_body" style:list-style-name="L10">
      <style:text-properties officeooo:rsid="00132612"/>
    </style:style>
    <style:style style:name="P19" style:family="paragraph" style:parent-style-name="Heading_20_3">
      <style:text-properties officeooo:rsid="00132612"/>
    </style:style>
    <style:style style:name="P20" style:family="paragraph" style:parent-style-name="Text_20_body" style:list-style-name="L11">
      <style:text-properties officeooo:rsid="00132612"/>
    </style:style>
    <style:style style:name="P21" style:family="paragraph" style:parent-style-name="Text_20_body" style:list-style-name="L11">
      <style:text-properties officeooo:paragraph-rsid="00144ea2"/>
    </style:style>
    <style:style style:name="P22" style:family="paragraph" style:parent-style-name="Table_20_Heading">
      <style:paragraph-properties fo:line-height="150%"/>
    </style:style>
    <style:style style:name="P23" style:family="paragraph" style:parent-style-name="Table_20_Contents">
      <style:paragraph-properties fo:line-height="150%"/>
    </style:style>
    <style:style style:name="P24" style:family="paragraph" style:parent-style-name="Heading_20_3">
      <style:text-properties officeooo:rsid="00132612" officeooo:paragraph-rsid="00132612"/>
    </style:style>
    <style:style style:name="P25" style:family="paragraph" style:parent-style-name="Text_20_body" style:list-style-name="L12">
      <style:text-properties officeooo:rsid="00132612"/>
    </style:style>
    <style:style style:name="P26" style:family="paragraph" style:parent-style-name="Text_20_body" style:list-style-name="L13">
      <style:text-properties officeooo:rsid="00132612"/>
    </style:style>
    <style:style style:name="P27" style:family="paragraph" style:parent-style-name="Standard">
      <style:text-properties officeooo:rsid="0014adef" officeooo:paragraph-rsid="0014adef" fo:background-color="#4e102d"/>
    </style:style>
    <style:style style:name="P28" style:family="paragraph" style:parent-style-name="Standard">
      <style:text-properties officeooo:rsid="0014adef" officeooo:paragraph-rsid="0014adef" fo:background-color="transparent"/>
    </style:style>
    <style:style style:name="P29" style:family="paragraph" style:parent-style-name="Heading_20_3">
      <style:text-properties officeooo:rsid="0014adef" officeooo:paragraph-rsid="0014adef" fo:background-color="transparent"/>
    </style:style>
    <style:style style:name="P30" style:family="paragraph" style:parent-style-name="Text_20_body" style:list-style-name="L14">
      <style:text-properties officeooo:rsid="0014adef"/>
    </style:style>
    <style:style style:name="P31" style:family="paragraph" style:parent-style-name="Horizontal_20_Line">
      <style:text-properties officeooo:rsid="0014adef"/>
    </style:style>
    <style:style style:name="P32" style:family="paragraph" style:parent-style-name="Heading_20_3">
      <style:text-properties officeooo:rsid="0014adef"/>
    </style:style>
    <style:style style:name="P33" style:family="paragraph" style:parent-style-name="Text_20_body" style:list-style-name="L15">
      <style:text-properties officeooo:rsid="0014adef"/>
    </style:style>
    <style:style style:name="P34" style:family="paragraph" style:parent-style-name="Text_20_body">
      <style:text-properties officeooo:rsid="0014adef" officeooo:paragraph-rsid="00167d97" fo:background-color="transparent"/>
    </style:style>
    <style:style style:name="P35" style:family="paragraph" style:parent-style-name="Text_20_body">
      <style:text-properties officeooo:rsid="0014adef"/>
    </style:style>
    <style:style style:name="P36" style:family="paragraph" style:parent-style-name="Preformatted_20_Text">
      <style:text-properties officeooo:rsid="0014adef" fo:background-color="#4e102d"/>
    </style:style>
    <style:style style:name="P37" style:family="paragraph" style:parent-style-name="Preformatted_20_Text">
      <style:paragraph-properties fo:margin-top="0in" fo:margin-bottom="0.1965in" style:contextual-spacing="false"/>
      <style:text-properties officeooo:rsid="0014adef"/>
    </style:style>
    <style:style style:name="P38" style:family="paragraph" style:parent-style-name="Heading_20_1">
      <style:text-properties officeooo:rsid="0014adef" officeooo:paragraph-rsid="0014adef" fo:background-color="transparent"/>
    </style:style>
    <style:style style:name="P39" style:family="paragraph" style:parent-style-name="Text_20_body" style:list-style-name="L16">
      <style:text-properties officeooo:rsid="0014adef"/>
    </style:style>
    <style:style style:name="P40" style:family="paragraph" style:parent-style-name="Standard">
      <style:paragraph-properties fo:text-align="start" style:justify-single-word="false"/>
      <style:text-properties officeooo:rsid="0014adef" officeooo:paragraph-rsid="0014adef" fo:background-color="transparent"/>
    </style:style>
    <style:style style:name="P41" style:family="paragraph" style:parent-style-name="Standard">
      <style:text-properties officeooo:rsid="001df8c8" officeooo:paragraph-rsid="001df8c8" fo:background-color="transparent"/>
    </style:style>
    <style:style style:name="P42" style:family="paragraph" style:parent-style-name="Standard">
      <style:text-properties officeooo:rsid="0014adef" officeooo:paragraph-rsid="001ec53b" fo:background-color="transparent"/>
    </style:style>
    <style:style style:name="P43" style:family="paragraph" style:parent-style-name="Standard">
      <style:text-properties officeooo:paragraph-rsid="0014adef"/>
    </style:style>
    <style:style style:name="P44" style:family="paragraph" style:parent-style-name="Standard">
      <style:text-properties officeooo:rsid="001ec53b" officeooo:paragraph-rsid="001ec53b"/>
    </style:style>
    <style:style style:name="P45" style:family="paragraph" style:parent-style-name="Standard">
      <style:text-properties fo:font-weight="bold" officeooo:rsid="001ec53b" officeooo:paragraph-rsid="001ec53b" style:font-weight-asian="bold" style:font-weight-complex="bold"/>
    </style:style>
    <style:style style:name="P46" style:family="paragraph" style:parent-style-name="Heading_20_1">
      <style:text-properties officeooo:rsid="001ec53b" officeooo:paragraph-rsid="001ec53b"/>
    </style:style>
    <style:style style:name="P47" style:family="paragraph" style:parent-style-name="Text_20_body" style:list-style-name="L17">
      <style:text-properties officeooo:rsid="001ec53b"/>
    </style:style>
    <style:style style:name="P48" style:family="paragraph" style:parent-style-name="Text_20_body" style:list-style-name="L18">
      <style:text-properties officeooo:rsid="0014adef"/>
    </style:style>
    <style:style style:name="P49" style:family="paragraph" style:parent-style-name="Text_20_body">
      <style:text-properties officeooo:rsid="0014adef" officeooo:paragraph-rsid="0014adef" fo:background-color="transparent"/>
    </style:style>
    <style:style style:name="P50" style:family="paragraph" style:parent-style-name="Text_20_body">
      <style:text-properties officeooo:rsid="0014adef" officeooo:paragraph-rsid="001a53a5" fo:background-color="transparent"/>
    </style:style>
    <style:style style:name="P51" style:family="paragraph" style:parent-style-name="Heading_20_4">
      <style:text-properties officeooo:rsid="0014adef"/>
    </style:style>
    <style:style style:name="P52" style:family="paragraph" style:parent-style-name="Text_20_body" style:list-style-name="L19">
      <style:text-properties officeooo:rsid="0014adef"/>
    </style:style>
    <style:style style:name="P53" style:family="paragraph" style:parent-style-name="Text_20_body" style:list-style-name="L20">
      <style:text-properties officeooo:rsid="0014adef"/>
    </style:style>
    <style:style style:name="P54" style:family="paragraph" style:parent-style-name="Text_20_body" style:list-style-name="L21">
      <style:text-properties officeooo:rsid="0014adef"/>
    </style:style>
    <style:style style:name="P55" style:family="paragraph" style:parent-style-name="Text_20_body" style:list-style-name="L22">
      <style:text-properties officeooo:rsid="0014adef"/>
    </style:style>
    <style:style style:name="P56" style:family="paragraph" style:parent-style-name="Text_20_body" style:list-style-name="L23">
      <style:text-properties officeooo:rsid="0014adef"/>
    </style:style>
    <style:style style:name="P57" style:family="paragraph" style:parent-style-name="Text_20_body" style:list-style-name="L24">
      <style:text-properties officeooo:rsid="0014adef"/>
    </style:style>
    <style:style style:name="P58" style:family="paragraph" style:parent-style-name="Text_20_body" style:list-style-name="L25">
      <style:text-properties officeooo:rsid="0014adef"/>
    </style:style>
    <style:style style:name="P59" style:family="paragraph" style:parent-style-name="Text_20_body" style:list-style-name="L26">
      <style:text-properties officeooo:rsid="0014adef"/>
    </style:style>
    <style:style style:name="P60" style:family="paragraph" style:parent-style-name="Text_20_body" style:list-style-name="L27">
      <style:text-properties officeooo:rsid="0014adef"/>
    </style:style>
    <style:style style:name="T1" style:family="text">
      <style:text-properties officeooo:rsid="00144ea2"/>
    </style:style>
    <style:style style:name="T2" style:family="text">
      <style:text-properties officeooo:rsid="00132612"/>
    </style:style>
    <style:style style:name="T3" style:family="text">
      <style:text-properties fo:background-color="#4e102d" loext:char-shading-value="0"/>
    </style:style>
    <style:style style:name="T4" style:family="text">
      <style:text-properties officeooo:rsid="001df8c8"/>
    </style:style>
    <style:style style:name="T5" style:family="text">
      <style:text-properties fo:font-weight="bold" style:font-weight-asian="bold" style:font-weight-complex="bold"/>
    </style:style>
    <style:style style:name="T6" style:family="text">
      <style:text-properties fo:background-color="#4e102d" loext:char-shading-value="0"/>
    </style:style>
    <style:style style:name="T7" style:family="text">
      <style:text-properties fo:background-color="#ec0808" loext:char-shading-value="0"/>
    </style:style>
    <style:style style:name="T8" style:family="text">
      <style:text-properties officeooo:rsid="001df8c8" fo:background-color="#ec0808" loext:char-shading-value="0"/>
    </style:style>
    <style:style style:name="T9" style:family="text">
      <style:text-properties officeooo:rsid="0014adef" fo:background-color="transparent" loext:char-shading-value="0"/>
    </style:style>
    <style:style style:name="T10" style:family="text">
      <style:text-properties officeooo:rsid="00238d55"/>
    </style:style>
    <style:style style:name="T11" style:family="text">
      <style:text-properties officeooo:rsid="001a53a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What is a File System?</text:h>
      <text:p text:style-name="Text_20_body">A <text:span text:style-name="Strong_20_Emphasis">file system</text:span> is the way an operating system organizes and manages data on storage (disk, SSD, USB, etc.).</text:p>
      <text:list text:style-name="L1">
        <text:list-item>
          <text:p text:style-name="P1">It decides <text:span text:style-name="Strong_20_Emphasis">how files are stored, named, accessed, and secured</text:span>.</text:p>
        </text:list-item>
        <text:list-item>
          <text:p text:style-name="P1">Without it, data would just be raw 0s and 1s with no meaning.</text:p>
        </text:list-item>
      </text:list>
      <text:p text:style-name="Text_20_body">👉 In Linux, <text:span text:style-name="Strong_20_Emphasis">everything is a file</text:span> (text, binary, device, process).</text:p>
      <text:p text:style-name="Horizontal_20_Line"/>
      <text:h text:style-name="Heading_20_1" text:outline-level="1">🔹 Types of File System Concepts in Linux</text:h>
      <text:h text:style-name="Heading_20_3" text:outline-level="3">1. <text:span text:style-name="Strong_20_Emphasis">Physical File System</text:span></text:h>
      <text:list text:style-name="L2">
        <text:list-item>
          <text:p text:style-name="P2">Lowest level — how data is actually stored on <text:span text:style-name="Strong_20_Emphasis">disks/partitions</text:span>.</text:p>
        </text:list-item>
        <text:list-item>
          <text:p text:style-name="P2">Deals with <text:span text:style-name="Strong_20_Emphasis">blocks, sectors, inodes</text:span>.</text:p>
        </text:list-item>
        <text:list-item>
          <text:p text:style-name="P2">Examples:</text:p>
          <text:list>
            <text:list-item>
              <text:p text:style-name="P2">ext4, XFS, Btrfs, NTFS, FAT32.</text:p>
            </text:list-item>
          </text:list>
        </text:list-item>
        <text:list-item>
          <text:p text:style-name="P2">Tools: <text:span text:style-name="Source_20_Text">mkfs.ext4</text:span>, <text:span text:style-name="Source_20_Text">fsck</text:span> (check &amp; repair).</text:p>
        </text:list-item>
      </text:list>
      <text:p text:style-name="Text_20_body">👉 Think of it as the <text:span text:style-name="Strong_20_Emphasis">roads and buildings</text:span> on a city map.</text:p>
      <text:p text:style-name="Text_20_body">---------------------------------------------------------------------------------------------------------------------</text:p>
      <text:p text:style-name="Text_20_body">👍 Here’s a <text:span text:style-name="Strong_20_Emphasis">super short summary</text:span> of common file systems you’ll encounter in Linux/DevOps:</text:p>
      <text:list text:style-name="L3">
        <text:list-item>
          <text:p text:style-name="P3"><text:span text:style-name="Strong_20_Emphasis">ext4</text:span> → Default Linux FS, reliable, supports large files (up to 16TB).</text:p>
        </text:list-item>
        <text:list-item>
          <text:p text:style-name="P3"><text:span text:style-name="Strong_20_Emphasis">XFS</text:span> → High-performance, good for big data &amp; servers.</text:p>
        </text:list-item>
        <text:list-item>
          <text:p text:style-name="P3"><text:span text:style-name="Strong_20_Emphasis">Btrfs</text:span> → Modern Linux FS, supports snapshots, compression, self-healing.</text:p>
        </text:list-item>
        <text:list-item>
          <text:p text:style-name="P3"><text:span text:style-name="Strong_20_Emphasis">NTFS</text:span> → Windows default FS, Linux can read/write with drivers.</text:p>
        </text:list-item>
        <text:list-item>
          <text:p text:style-name="P3"><text:span text:style-name="Strong_20_Emphasis">FAT32</text:span> → Old, works everywhere (USB, cameras), but max 4GB file size.</text:p>
        </text:list-item>
      </text:list>
      <text:p text:style-name="Text_20_body">👉 Trick to remember:<text:line-break/><text:span text:style-name="Strong_20_Emphasis">“Every Xtra Big Network File”</text:span> → <text:span text:style-name="Strong_20_Emphasis">ext4, XFS, Btrfs, NTFS, FAT32</text:span></text:p>
      <text:p text:style-name="Text_20_body"/>
      <text:p text:style-name="P4">------------------------------------------------------------------------------------------------------------</text:p>
      <text:h text:style-name="P5" text:outline-level="3">📂 Common File Systems &amp; Their Full Forms / Origins</text:h>
      <text:list text:style-name="L4">
        <text:list-item>
          <text:p text:style-name="P6"><text:span text:style-name="Strong_20_Emphasis">ext4</text:span> → <text:span text:style-name="Strong_20_Emphasis">Fourth Extended File System</text:span></text:p>
          <text:list>
            <text:list-item>
              <text:p text:style-name="P6">Successor of ext3, ext2. Standard Linux FS.</text:p>
            </text:list-item>
          </text:list>
        </text:list-item>
        <text:list-item>
          <text:p text:style-name="P6"><text:span text:style-name="Strong_20_Emphasis">XFS</text:span> → Originally from <text:span text:style-name="Strong_20_Emphasis">X Operating System (XOS)</text:span> project at SGI (Silicon Graphics).</text:p>
          <text:list>
            <text:list-item>
              <text:p text:style-name="P6"><text:soft-page-break/>Not really a “full form,” but often just referred to as <text:span text:style-name="Strong_20_Emphasis">X File System</text:span>.</text:p>
            </text:list-item>
          </text:list>
        </text:list-item>
        <text:list-item>
          <text:p text:style-name="P6"><text:span text:style-name="Strong_20_Emphasis">Btrfs</text:span> → <text:span text:style-name="Strong_20_Emphasis">B-tree File System</text:span></text:p>
          <text:list>
            <text:list-item>
              <text:p text:style-name="P6">Uses B-trees for organization, supports snapshots and advanced features.</text:p>
            </text:list-item>
          </text:list>
        </text:list-item>
        <text:list-item>
          <text:p text:style-name="P6"><text:span text:style-name="Strong_20_Emphasis">NTFS</text:span> → <text:span text:style-name="Strong_20_Emphasis">New Technology File System</text:span></text:p>
          <text:list>
            <text:list-item>
              <text:p text:style-name="P6">Microsoft Windows default FS since Windows NT.</text:p>
            </text:list-item>
          </text:list>
        </text:list-item>
        <text:list-item>
          <text:p text:style-name="P6"><text:span text:style-name="Strong_20_Emphasis">FAT32</text:span> → <text:span text:style-name="Strong_20_Emphasis">File Allocation Table (32-bit version)</text:span></text:p>
          <text:list>
            <text:list-item>
              <text:p text:style-name="P6">Very old, used in USBs, cameras, etc. Limited features.</text:p>
            </text:list-item>
          </text:list>
        </text:list-item>
      </text:list>
      <text:p text:style-name="P4">------------------------------------------------------------------------------------------------------------------</text:p>
      <text:p text:style-name="Text_20_body">👉 Easy recall trick:</text:p>
      <text:list text:style-name="L5">
        <text:list-item>
          <text:p text:style-name="P7">ext → “extended” (Linux native)</text:p>
        </text:list-item>
        <text:list-item>
          <text:p text:style-name="P7">XFS → “X” (high-performance, enterprise)</text:p>
        </text:list-item>
        <text:list-item>
          <text:p text:style-name="P7">Btrfs → “B-tree” (modern, advanced)</text:p>
        </text:list-item>
        <text:list-item>
          <text:p text:style-name="P7">NTFS → “New Tech” (Windows)</text:p>
        </text:list-item>
        <text:list-item>
          <text:p text:style-name="P7">FAT → “File Allocation Table” (old but universal)</text:p>
        </text:list-item>
      </text:list>
      <text:p text:style-name="Text_20_body"/>
      <text:p text:style-name="Horizontal_20_Line"/>
      <text:h text:style-name="Heading_20_3" text:outline-level="3">2. <text:span text:style-name="Strong_20_Emphasis">Logical File System</text:span></text:h>
      <text:list text:style-name="L6">
        <text:list-item>
          <text:p text:style-name="P8">Provides <text:span text:style-name="Strong_20_Emphasis">structure and rules</text:span> for organizing files.</text:p>
        </text:list-item>
        <text:list-item>
          <text:p text:style-name="P8">Handles <text:span text:style-name="Strong_20_Emphasis">metadata</text:span>: file names, permissions, directories, ownership.</text:p>
        </text:list-item>
        <text:list-item>
          <text:p text:style-name="P8">It maps user-level file operations (<text:span text:style-name="Source_20_Text">open</text:span>, <text:span text:style-name="Source_20_Text">read</text:span>, <text:span text:style-name="Source_20_Text">write</text:span>) to the physical layer.</text:p>
        </text:list-item>
      </text:list>
      <text:p text:style-name="Text_20_body">👉 Think of it as <text:span text:style-name="Strong_20_Emphasis">city planning</text:span> — how houses (files) are arranged, who owns them, and what rules apply.</text:p>
      <text:p text:style-name="Horizontal_20_Line"/>
      <text:h text:style-name="Heading_20_3" text:outline-level="3">3. <text:span text:style-name="Strong_20_Emphasis">Virtual File System (VFS)</text:span></text:h>
      <text:list text:style-name="L7">
        <text:list-item>
          <text:p text:style-name="P9">A <text:span text:style-name="Strong_20_Emphasis">kernel layer</text:span> that provides a <text:span text:style-name="Strong_20_Emphasis">uniform interface</text:span> for all file systems.</text:p>
        </text:list-item>
        <text:list-item>
          <text:p text:style-name="P9">You can use the same commands (<text:span text:style-name="Source_20_Text">ls</text:span>, <text:span text:style-name="Source_20_Text">cp</text:span>, <text:span text:style-name="Source_20_Text">rm</text:span>) whether the backend is ext4, NTFS, NFS, etc.</text:p>
        </text:list-item>
        <text:list-item>
          <text:p text:style-name="P9">Allows Linux to support <text:span text:style-name="Strong_20_Emphasis">multiple file systems at once</text:span>.</text:p>
        </text:list-item>
        <text:list-item>
          <text:p text:style-name="P9">Example: You mount an <text:span text:style-name="Strong_20_Emphasis">NTFS USB drive</text:span> and an <text:span text:style-name="Strong_20_Emphasis">ext4 partition</text:span>, and both work seamlessly because of VFS.</text:p>
        </text:list-item>
      </text:list>
      <text:p text:style-name="Text_20_body">👉 Think of it as a <text:span text:style-name="Strong_20_Emphasis">translator</text:span> between you (the user) and different storage systems.</text:p>
      <text:p text:style-name="Horizontal_20_Line"/>
      <text:h text:style-name="Heading_20_1" text:outline-level="1"><text:soft-page-break/>🔹 How They Work Together (Layered View)</text:h>
      <text:p text:style-name="Standard">+-----------------------+ <text:s text:c="2"/>&lt;- User commands (ls, cp, grep)</text:p>
      <text:p text:style-name="Standard">| Applications &amp; Shell <text:s/>|</text:p>
      <text:p text:style-name="Standard">+-----------------------+ <text:s text:c="2"/>&lt;- Virtual File System (VFS layer in kernel)</text:p>
      <text:p text:style-name="Standard">| VFS API (open, read) <text:s/>|</text:p>
      <text:p text:style-name="Standard">+-----------------------+ <text:s text:c="2"/>&lt;- Logical File System (directories, permissions)</text:p>
      <text:p text:style-name="Standard">| Metadata, Inodes, <text:s text:c="4"/>|</text:p>
      <text:p text:style-name="Standard">| Ownership, Security <text:s text:c="2"/>|</text:p>
      <text:p text:style-name="Standard">+-----------------------+ <text:s text:c="2"/>&lt;- Physical File System (ext4, xfs, ntfs)</text:p>
      <text:p text:style-name="Standard">| Disk blocks, sectors <text:s/>|</text:p>
      <text:p text:style-name="Standard">+-----------------------+ <text:s text:c="2"/>&lt;- Storage hardware (SSD, HDD, USB)</text:p>
      <text:p text:style-name="Standard"/>
      <text:p text:style-name="Standard"/>
      <text:p text:style-name="P10">________________________________________________________________________________</text:p>
      <text:p text:style-name="P10"/>
      <text:h text:style-name="P11" text:outline-level="1">🔹 Example Walkthrough</text:h>
      <text:p text:style-name="P12">When you type:</text:p>
      <text:p text:style-name="P10">cat /home/nyapu/notes.txt</text:p>
      <text:p text:style-name="P10"/>
      <text:p text:style-name="P13"><text:span text:style-name="Strong_20_Emphasis">User command</text:span> (<text:span text:style-name="Source_20_Text">cat</text:span>) asks kernel to open the file.</text:p>
      <text:list text:style-name="L8">
        <text:list-item>
          <text:p text:style-name="P14"><text:span text:style-name="Strong_20_Emphasis">VFS</text:span> receives request → decides which FS driver (ext4, NTFS, etc.) to use.</text:p>
        </text:list-item>
        <text:list-item>
          <text:p text:style-name="P14"><text:span text:style-name="Strong_20_Emphasis">Logical FS</text:span> → checks metadata (path <text:span text:style-name="Source_20_Text">/home/nyapu/</text:span>, permissions, inode).</text:p>
        </text:list-item>
        <text:list-item>
          <text:p text:style-name="P14"><text:span text:style-name="Strong_20_Emphasis">Physical FS</text:span> → fetches data blocks from disk sectors.</text:p>
        </text:list-item>
        <text:list-item>
          <text:p text:style-name="P14">Data is returned and shown on your screen.</text:p>
        </text:list-item>
      </text:list>
      <text:p text:style-name="P15"/>
      <text:h text:style-name="P16" text:outline-level="1">🔹 Special File Systems in Linux</text:h>
      <text:p text:style-name="P12">Not all filesystems are on disk! Some are <text:span text:style-name="Strong_20_Emphasis">virtual/pseudo filesystems</text:span>:</text:p>
      <text:list text:style-name="L9">
        <text:list-item>
          <text:p text:style-name="P17"><text:span text:style-name="Source_20_Text">/proc</text:span> → process &amp; kernel info (not real files, but generated by kernel).</text:p>
        </text:list-item>
        <text:list-item>
          <text:p text:style-name="P17"><text:span text:style-name="Source_20_Text">/sys</text:span> → system and hardware info.</text:p>
        </text:list-item>
        <text:list-item>
          <text:p text:style-name="P17"><text:span text:style-name="Source_20_Text">tmpfs</text:span> → in-memory temporary filesystem (used for <text:span text:style-name="Source_20_Text">/tmp</text:span>, <text:span text:style-name="Source_20_Text">/run</text:span>).</text:p>
        </text:list-item>
      </text:list>
      <text:p text:style-name="P12">👉 These act like files, but live in <text:span text:style-name="Strong_20_Emphasis">RAM or kernel memory</text:span>, not on disk.</text:p>
      <text:p text:style-name="P15"/>
      <text:h text:style-name="P16" text:outline-level="1">🎯 DevOps Takeaway</text:h>
      <text:list text:style-name="L10">
        <text:list-item>
          <text:p text:style-name="P18"><text:span text:style-name="Strong_20_Emphasis">Physical FS</text:span> → How data lives on storage.</text:p>
        </text:list-item>
        <text:list-item>
          <text:p text:style-name="P18"><text:span text:style-name="Strong_20_Emphasis">Logical FS</text:span> → How Linux organizes files (permissions, dirs, inodes).</text:p>
        </text:list-item>
        <text:list-item>
          <text:p text:style-name="P18"><text:soft-page-break/><text:span text:style-name="Strong_20_Emphasis">Virtual FS (VFS)</text:span> → Provides a single interface for different FS types.</text:p>
        </text:list-item>
      </text:list>
      <text:p text:style-name="P12">This layered approach makes Linux extremely flexible for <text:span text:style-name="Strong_20_Emphasis">servers, containers, and cloud environments</text:span>.</text:p>
      <text:p text:style-name="P15"/>
      <text:p text:style-name="P10"><text:line-break/><text:span text:style-name="T1">**</text:span><text:line-break/><text:line-break/>🗂️ Linux File System (Deep Dive)</text:p>
      <text:h text:style-name="P19" text:outline-level="3">1. <text:span text:style-name="Strong_20_Emphasis">Everything is a File</text:span></text:h>
      <text:list text:style-name="L11">
        <text:list-item>
          <text:p text:style-name="P20">In Linux, <text:span text:style-name="Strong_20_Emphasis">everything is treated as a file</text:span>:</text:p>
          <text:list>
            <text:list-item>
              <text:p text:style-name="P21"><text:span text:style-name="T2">Normal files →</text:span><text:span text:style-name="T1">T</text:span>ext files, images, programs <text:span text:style-name="T2">text, images, executables(e.g., </text:span><text:span text:style-name="Source_20_Text"><text:span text:style-name="T2">document.txt</text:span></text:span><text:span text:style-name="T2">).</text:span></text:p>
            </text:list-item>
            <text:list-item>
              <text:p text:style-name="P20">Directories → folders (special files containing file lists)</text:p>
            </text:list-item>
            <text:list-item>
              <text:p text:style-name="P20"><text:span text:style-name="Strong_20_Emphasis">Devices:</text:span> Your hard disk, keyboard, printer, and USB drive are all represented as files (e.g., <text:span text:style-name="Source_20_Text">/dev/sda1</text:span>).</text:p>
            </text:list-item>
            <text:list-item>
              <text:p text:style-name="P20"><text:span text:style-name="Source_20_Text"><text:span text:style-name="Strong_20_Emphasis">Processes:</text:span></text:span><text:span text:style-name="Source_20_Text"> Information about running programs is stored in files (e.g., /proc/123).</text:span></text:p>
            </text:list-item>
            <text:list-item>
              <text:p text:style-name="P20"><text:span text:style-name="Source_20_Text"><text:span text:style-name="Strong_20_Emphasis">Links:</text:span></text:span><text:span text:style-name="Source_20_Text"> Pointers to other files (like shortcuts).</text:span></text:p>
            </text:list-item>
          </text:list>
        </text:list-item>
      </text:list>
      <text:p text:style-name="P12">👉 This unification makes Linux powerful — same commands can work on files, devices, or sockets.</text:p>
      <text:p text:style-name="P12"/>
      <text:h text:style-name="P19" text:outline-level="3"><text:span text:style-name="Strong_20_Emphasis">2. The Filesystem Hierarchy Standard (FHS)</text:span></text:h>
      <text:p text:style-name="P12">Linux systems follow a standard layout called the FHS. This is the "map" of the city. Here are the most important directories you <text:span text:style-name="Strong_20_Emphasis">must know</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2">Directory</text:p>
            </table:table-cell>
            <table:table-cell table:style-name="Table1.A1" office:value-type="string">
              <text:p text:style-name="P22">Purpose &amp; Contents</text:p>
            </table:table-cell>
            <table:table-cell table:style-name="Table1.A1" office:value-type="string">
              <text:p text:style-name="P22">DevOps Relevance</text:p>
            </table:table-cell>
          </table:table-row>
        </table:table-header-rows>
        <table:table-row>
          <table:table-cell table:style-name="Table1.A1" office:value-type="string">
            <text:p text:style-name="P23"><text:span text:style-name="Strong_20_Emphasis"><text:span text:style-name="Source_20_Text">/</text:span></text:span></text:p>
          </table:table-cell>
          <table:table-cell table:style-name="Table1.A1" office:value-type="string">
            <text:p text:style-name="P23"><text:span text:style-name="Strong_20_Emphasis"><text:span text:style-name="T3">The Root.</text:span></text:span> The master directory. The starting point of the entire filesystem.</text:p>
          </table:table-cell>
          <table:table-cell table:style-name="Table1.A1" office:value-type="string">
            <text:p text:style-name="P23">Everything is under here.</text:p>
          </table:table-cell>
        </table:table-row>
        <table:table-row table:style-name="Table1.3">
          <table:table-cell table:style-name="Table1.A1" office:value-type="string">
            <text:p text:style-name="P23"><text:span text:style-name="Strong_20_Emphasis"><text:span text:style-name="Source_20_Text">/bin</text:span></text:span></text:p>
          </table:table-cell>
          <table:table-cell table:style-name="Table1.A1" office:value-type="string">
            <text:p text:style-name="P23"><text:span text:style-name="Strong_20_Emphasis"><text:span text:style-name="T3">Essential User Binaries.</text:span></text:span> Core commands needed for basic system operation (e.g., <text:span text:style-name="Source_20_Text">ls</text:span>, <text:span text:style-name="Source_20_Text">cp</text:span>, <text:span text:style-name="Source_20_Text">bash</text:span>, <text:span text:style-name="Source_20_Text">cat</text:span>).</text:p>
          </table:table-cell>
          <table:table-cell table:style-name="Table1.A1" office:value-type="string">
            <text:p text:style-name="P23">Critical for recovery and basic scripts.</text:p>
          </table:table-cell>
        </table:table-row>
        <table:table-row>
          <table:table-cell table:style-name="Table1.A1" office:value-type="string">
            <text:p text:style-name="P23"><text:span text:style-name="Strong_20_Emphasis"><text:span text:style-name="Source_20_Text">/etc</text:span></text:span></text:p>
          </table:table-cell>
          <table:table-cell table:style-name="Table1.A1" office:value-type="string">
            <text:p text:style-name="P23"><text:span text:style-name="Strong_20_Emphasis"><text:span text:style-name="T3">Configuration Files.</text:span></text:span> All system-wide configuration files for your OS and applications.</text:p>
          </table:table-cell>
          <table:table-cell table:style-name="Table1.A1" office:value-type="string">
            <text:p text:style-name="P23"><text:span text:style-name="Strong_20_Emphasis">EXTREMELY IMPORTANT.</text:span> You will live here. (e.g., <text:span text:style-name="Source_20_Text">/etc/nginx/</text:span>, <text:span text:style-name="Source_20_Text">/etc/docker/</text:span>).</text:p>
          </table:table-cell>
        </table:table-row>
        <table:table-row table:style-name="Table1.5">
          <table:table-cell table:style-name="Table1.A1" office:value-type="string">
            <text:p text:style-name="P23"><text:span text:style-name="Strong_20_Emphasis"><text:span text:style-name="Source_20_Text">/home</text:span></text:span></text:p>
          </table:table-cell>
          <table:table-cell table:style-name="Table1.A1" office:value-type="string">
            <text:p text:style-name="P23"><text:span text:style-name="Strong_20_Emphasis"><text:span text:style-name="T3">User Home Directories</text:span></text:span><text:span text:style-name="Strong_20_Emphasis">.</text:span> Each user gets a personal folder here (e.g., <text:span text:style-name="Source_20_Text">/home/nyapu</text:span>). This <text:soft-page-break/>is where your personal files and projects live.</text:p>
          </table:table-cell>
          <table:table-cell table:style-name="Table1.A1" office:value-type="string">
            <text:p text:style-name="P23">Where you develop, test, and store your scripts. <text:span text:style-name="Source_20_Text">~</text:span> is a shortcut for your <text:soft-page-break/>home directory.</text:p>
          </table:table-cell>
        </table:table-row>
        <table:table-row>
          <table:table-cell table:style-name="Table1.A1" office:value-type="string">
            <text:p text:style-name="P23"><text:span text:style-name="Strong_20_Emphasis"><text:span text:style-name="Source_20_Text">/opt</text:span></text:span></text:p>
          </table:table-cell>
          <table:table-cell table:style-name="Table1.A1" office:value-type="string">
            <text:p text:style-name="P23"><text:span text:style-name="Strong_20_Emphasis"><text:span text:style-name="T3">Optional/Add-on Software</text:span></text:span><text:span text:style-name="Strong_20_Emphasis">.</text:span> Manually installed third-party applications often go here (e.g., <text:span text:style-name="Source_20_Text">/opt/google/chrome</text:span>).</text:p>
          </table:table-cell>
          <table:table-cell table:style-name="Table1.A1" office:value-type="string">
            <text:p text:style-name="P23">Sometimes used for custom-installed tools.</text:p>
          </table:table-cell>
        </table:table-row>
        <table:table-row>
          <table:table-cell table:style-name="Table1.A1" office:value-type="string">
            <text:p text:style-name="P23"><text:span text:style-name="Strong_20_Emphasis"><text:span text:style-name="Source_20_Text">/tmp</text:span></text:span></text:p>
          </table:table-cell>
          <table:table-cell table:style-name="Table1.A1" office:value-type="string">
            <text:p text:style-name="P23"><text:span text:style-name="Strong_20_Emphasis"><text:span text:style-name="T3">Temporary Files.</text:span></text:span><text:span text:style-name="T3"> </text:span>Volatile storage that is usually cleared on reboot.</text:p>
          </table:table-cell>
          <table:table-cell table:style-name="Table1.A1" office:value-type="string">
            <text:p text:style-name="P23">Used for temporary download/cache in scripts.</text:p>
          </table:table-cell>
        </table:table-row>
        <table:table-row>
          <table:table-cell table:style-name="Table1.A1" office:value-type="string">
            <text:p text:style-name="P23"><text:span text:style-name="Strong_20_Emphasis"><text:span text:style-name="Source_20_Text">/usr</text:span></text:span></text:p>
          </table:table-cell>
          <table:table-cell table:style-name="Table1.A1" office:value-type="string">
            <text:p text:style-name="P23"><text:span text:style-name="Strong_20_Emphasis"><text:span text:style-name="T3">User Programs &amp; Read-Only Data</text:span></text:span><text:span text:style-name="Strong_20_Emphasis">.</text:span> Contains the majority of user utilities and applications (e.g., <text:span text:style-name="Source_20_Text">/usr/bin/</text:span>, <text:span text:style-name="Source_20_Text">/usr/lib/</text:span>, <text:span text:style-name="Source_20_Text">/usr/local/</text:span>).</text:p>
          </table:table-cell>
          <table:table-cell table:style-name="Table1.A1" office:value-type="string">
            <text:p text:style-name="P23">Where most software is installed.</text:p>
          </table:table-cell>
        </table:table-row>
        <table:table-row>
          <table:table-cell table:style-name="Table1.A1" office:value-type="string">
            <text:p text:style-name="P23"><text:span text:style-name="Strong_20_Emphasis"><text:span text:style-name="Source_20_Text">/var</text:span></text:span></text:p>
          </table:table-cell>
          <table:table-cell table:style-name="Table1.A1" office:value-type="string">
            <text:p text:style-name="P23"><text:span text:style-name="Strong_20_Emphasis"><text:span text:style-name="T3">Variable Data.</text:span></text:span><text:span text:style-name="T3"> </text:span>Files that are expected to <text:span text:style-name="Strong_20_Emphasis">grow</text:span> (vary) like logs, databases, caches, and email queues.</text:p>
          </table:table-cell>
          <table:table-cell table:style-name="Table1.A1" office:value-type="string">
            <text:p text:style-name="P23"><text:span text:style-name="Strong_20_Emphasis">EXTREMELY IMPORTANT.</text:span> Logs are here (e.g., <text:span text:style-name="Source_20_Text">/var/log/nginx/</text:span>).</text:p>
          </table:table-cell>
        </table:table-row>
        <table:table-row>
          <table:table-cell table:style-name="Table1.A1" office:value-type="string">
            <text:p text:style-name="P23"><text:span text:style-name="Strong_20_Emphasis"><text:span text:style-name="Source_20_Text">/boot</text:span></text:span></text:p>
          </table:table-cell>
          <table:table-cell table:style-name="Table1.A1" office:value-type="string">
            <text:p text:style-name="P23"><text:span text:style-name="Strong_20_Emphasis"><text:span text:style-name="T3">Boot Loader Files.</text:span></text:span><text:span text:style-name="T3"> </text:span>Files needed to start the boot process (like the Linux kernel).</text:p>
          </table:table-cell>
          <table:table-cell table:style-name="Table1.A1" office:value-type="string">
            <text:p text:style-name="P23">Don't touch this unless you know what you're doing!</text:p>
          </table:table-cell>
        </table:table-row>
        <table:table-row>
          <table:table-cell table:style-name="Table1.A1" office:value-type="string">
            <text:p text:style-name="P23"><text:span text:style-name="Strong_20_Emphasis"><text:span text:style-name="Source_20_Text">/dev</text:span></text:span></text:p>
          </table:table-cell>
          <table:table-cell table:style-name="Table1.A1" office:value-type="string">
            <text:p text:style-name="P23"><text:span text:style-name="Strong_20_Emphasis"><text:span text:style-name="T3">Device Files.</text:span></text:span> Where hardware components are represented as files (e.g., <text:span text:style-name="Source_20_Text">/dev/sda</text:span> is your first hard disk).</text:p>
          </table:table-cell>
          <table:table-cell table:style-name="Table1.A1" office:value-type="string">
            <text:p text:style-name="P23">Used for advanced storage management (LVM).</text:p>
          </table:table-cell>
        </table:table-row>
        <table:table-row>
          <table:table-cell table:style-name="Table1.A1" office:value-type="string">
            <text:p text:style-name="P23"><text:span text:style-name="Strong_20_Emphasis"><text:span text:style-name="Source_20_Text">/proc</text:span></text:span></text:p>
          </table:table-cell>
          <table:table-cell table:style-name="Table1.A1" office:value-type="string">
            <text:p text:style-name="P23"><text:span text:style-name="Strong_20_Emphasis"><text:span text:style-name="T3">Process Information.</text:span></text:span><text:span text:style-name="T3"> </text:span>A virtual filesystem that provides a window into the running <text:span text:style-name="Strong_20_Emphasis">proc</text:span>esses and kernel parameters.</text:p>
          </table:table-cell>
          <table:table-cell table:style-name="Table1.A1" office:value-type="string">
            <text:p text:style-name="P23">For monitoring and debugging running software.</text:p>
          </table:table-cell>
        </table:table-row>
        <table:table-row>
          <table:table-cell table:style-name="Table1.A1" office:value-type="string">
            <text:p text:style-name="P23"><text:span text:style-name="Strong_20_Emphasis"><text:span text:style-name="Source_20_Text">/lib</text:span></text:span></text:p>
          </table:table-cell>
          <table:table-cell table:style-name="Table1.A1" office:value-type="string">
            <text:p text:style-name="P23"><text:span text:style-name="Strong_20_Emphasis"><text:span text:style-name="T3">Essential Shared Libraries.</text:span></text:span> Library files needed by the binaries in <text:span text:style-name="Source_20_Text">/bin/</text:span> and <text:span text:style-name="Source_20_Text">/sbin/</text:span>.</text:p>
          </table:table-cell>
          <table:table-cell table:style-name="Table1.A1" office:value-type="string">
            <text:p text:style-name="P23">Critical for programs to run.</text:p>
          </table:table-cell>
        </table:table-row>
      </table:table>
      <text:p text:style-name="P12"><text:span text:style-name="Strong_20_Emphasis"/></text:p>
      <text:p text:style-name="P12"><text:span text:style-name="Strong_20_Emphasis"/></text:p>
      <text:p text:style-name="P12"><text:span text:style-name="Strong_20_Emphasis">Memory Technique:</text:span> Remember the phrase: <text:span text:style-name="Strong_20_Emphasis">"Better Eat Everything Home-cooked, Or Use Various Vegetables, But Don't Procrastinate Learning."</text:span> (B-in, E-tc, H-ome, O-pt, U-sr, V-ar, B-oot, D-ev, P-roc, L-ib).</text:p>
      <text:p text:style-name="P12"/>
      <text:h text:style-name="P24" text:outline-level="3">3. <text:span text:style-name="Strong_20_Emphasis">File Types</text:span></text:h>
      <text:p text:style-name="P12">Check with: <text:span text:style-name="Source_20_Text">ls -l</text:span> (first character shows type)</text:p>
      <text:list text:style-name="L12">
        <text:list-item>
          <text:p text:style-name="P25"><text:span text:style-name="Source_20_Text">-</text:span> → regular file</text:p>
        </text:list-item>
        <text:list-item>
          <text:p text:style-name="P25"><text:soft-page-break/><text:span text:style-name="Source_20_Text">d</text:span> → directory</text:p>
        </text:list-item>
        <text:list-item>
          <text:p text:style-name="P25"><text:span text:style-name="Source_20_Text">l</text:span> → symbolic link (shortcut)</text:p>
        </text:list-item>
        <text:list-item>
          <text:p text:style-name="P25"><text:span text:style-name="Source_20_Text">c</text:span> → character device (<text:span text:style-name="Source_20_Text">/dev/tty</text:span>)</text:p>
        </text:list-item>
        <text:list-item>
          <text:p text:style-name="P25"><text:span text:style-name="Source_20_Text">b</text:span> → block device (<text:span text:style-name="Source_20_Text">/dev/sda</text:span>)</text:p>
        </text:list-item>
        <text:list-item>
          <text:p text:style-name="P25"><text:span text:style-name="Source_20_Text">p</text:span> → pipe</text:p>
        </text:list-item>
        <text:list-item>
          <text:p text:style-name="P25"><text:span text:style-name="Source_20_Text">s</text:span> → socket</text:p>
        </text:list-item>
      </text:list>
      <text:h text:style-name="P24" text:outline-level="3">4. <text:span text:style-name="Strong_20_Emphasis">Inodes</text:span></text:h>
      <text:list text:style-name="L13">
        <text:list-item>
          <text:p text:style-name="P26">Every file has an <text:span text:style-name="Strong_20_Emphasis">inode</text:span> (index node).</text:p>
        </text:list-item>
        <text:list-item>
          <text:p text:style-name="P26">Inode stores <text:span text:style-name="Strong_20_Emphasis">metadata</text:span>:</text:p>
          <text:list>
            <text:list-item>
              <text:p text:style-name="P26">file size, owner, permissions, timestamps, data block locations.</text:p>
            </text:list-item>
          </text:list>
        </text:list-item>
        <text:list-item>
          <text:p text:style-name="P26">View inode:</text:p>
        </text:list-item>
      </text:list>
      <text:p text:style-name="P10"><text:s text:c="29"/><text:span text:style-name="T3">ls -i file.txt</text:span></text:p>
      <text:p text:style-name="P10"><text:s text:c="29"/><text:span text:style-name="T3">stat file.txt</text:span></text:p>
      <text:p text:style-name="P27"/>
      <text:p text:style-name="P28">👉 Actual file contents are stored in blocks, inode is just the "address book".</text:p>
      <text:p text:style-name="P28"/>
      <text:h text:style-name="P29" text:outline-level="3">7. <text:span text:style-name="Strong_20_Emphasis">Special Files</text:span></text:h>
      <text:list text:style-name="L14">
        <text:list-item>
          <text:p text:style-name="P30"><text:span text:style-name="Source_20_Text">/dev/null</text:span> → "black hole", discards data.</text:p>
        </text:list-item>
        <text:list-item>
          <text:p text:style-name="P30"><text:span text:style-name="Source_20_Text">/dev/zero</text:span> → infinite stream of zeros.</text:p>
        </text:list-item>
        <text:list-item>
          <text:p text:style-name="P30"><text:span text:style-name="Source_20_Text">/dev/random</text:span> → random data generator.</text:p>
        </text:list-item>
      </text:list>
      <text:p text:style-name="P31"/>
      <text:h text:style-name="P32" text:outline-level="3">8. <text:span text:style-name="Strong_20_Emphasis">Important Commands</text:span></text:h>
      <text:list text:style-name="L15">
        <text:list-item>
          <text:p text:style-name="P33"><text:span text:style-name="Source_20_Text">pwd</text:span> → where am I?</text:p>
        </text:list-item>
        <text:list-item>
          <text:p text:style-name="P33"><text:span text:style-name="Source_20_Text">ls -l</text:span> → list with details.</text:p>
        </text:list-item>
        <text:list-item>
          <text:p text:style-name="P33"><text:span text:style-name="Source_20_Text">tree</text:span> (if installed) → show directory tree.</text:p>
        </text:list-item>
        <text:list-item>
          <text:p text:style-name="P33"><text:span text:style-name="Source_20_Text">du -sh /var/log/*</text:span> → size of each log file.</text:p>
        </text:list-item>
        <text:list-item>
          <text:p text:style-name="P33"><text:span text:style-name="Source_20_Text">df -h</text:span> → disk space.</text:p>
        </text:list-item>
        <text:list-item>
          <text:p text:style-name="P33"><text:span text:style-name="Source_20_Text">find /etc -name "*.conf"</text:span> → find config files.</text:p>
        </text:list-item>
      </text:list>
      <text:p text:style-name="P28"/>
      <text:p text:style-name="P28"/>
      <text:p text:style-name="P28"/>
      <text:p text:style-name="P28"/>
      <text:p text:style-name="P34"><text:span text:style-name="Strong_20_Emphasis">Like me, you might also wonder: if commands like </text:span><text:span text:style-name="Strong_20_Emphasis"><text:span text:style-name="Source_20_Text">ls</text:span></text:span><text:span text:style-name="Strong_20_Emphasis">, </text:span><text:span text:style-name="Strong_20_Emphasis"><text:span text:style-name="Source_20_Text">cp</text:span></text:span><text:span text:style-name="Strong_20_Emphasis">, etc. are only located inside </text:span><text:span text:style-name="Strong_20_Emphasis"><text:span text:style-name="Source_20_Text">/bin</text:span></text:span><text:span text:style-name="Strong_20_Emphasis">, then how do they work everywhere in the system?”</text:span></text:p>
      <text:h text:style-name="P29" text:outline-level="3"><text:soft-page-break/><text:span text:style-name="Strong_20_Emphasis">Why does </text:span><text:span text:style-name="Strong_20_Emphasis"><text:span text:style-name="Source_20_Text">/bin/ls</text:span></text:span><text:span text:style-name="Strong_20_Emphasis"> work everywhere?</text:span></text:h>
      <text:p text:style-name="P35">Remember the <text:span text:style-name="Source_20_Text">$PATH</text:span> environment variable? It's like your brain's internal directory of where to find tools.</text:p>
      <text:p text:style-name="P35">When you type <text:span text:style-name="Source_20_Text">ls</text:span>, your system doesn't search the whole building. It quickly checks a predefined list of locations it knows contains programs. <text:span text:style-name="Source_20_Text">/bin</text:span> and <text:span text:style-name="Source_20_Text">/usr/bin</text:span> are at the top of that list.</text:p>
      <text:p text:style-name="P35">You can see this list by typing:</text:p>
      <text:p text:style-name="P35">bash</text:p>
      <text:p text:style-name="P36">echo $PATH</text:p>
      <text:p text:style-name="P37"># Output will look like: <text:span text:style-name="T3">/usr/local/sbin:/usr/local/bin:/usr/sbin:/usr/bin:/sbin:/bin</text:span></text:p>
      <text:p text:style-name="P35">So, when you type <text:span text:style-name="Source_20_Text">ls</text:span> in your cubicle (<text:span text:style-name="Source_20_Text">/home/nyapu</text:span>), your system says "Ah, <text:span text:style-name="Source_20_Text">ls</text:span>! I know I have a tool by that name in the <text:span text:style-name="Source_20_Text">/bin</text:span> warehouse." It goes and gets it from there and runs it.</text:p>
      <text:p text:style-name="P35">The command itself lives in <text:span text:style-name="Source_20_Text">/bin</text:span>, but it can be <text:span text:style-name="Strong_20_Emphasis">executed</text:span> from anywhere because the system knows where to find it.</text:p>
      <text:p text:style-name="P35">This tour is your map. With this mental model, you will never be lost. You'll always know what directory you're in and what kind of files you should expect to find there.</text:p>
      <text:p text:style-name="P28"/>
      <text:h text:style-name="P38" text:outline-level="1">🛠 Mini Project<text:span text:style-name="T4">1</text:span>: <text:span text:style-name="Strong_20_Emphasis">Personal Notes Manager</text:span></text:h>
      <text:p text:style-name="P35">👉 A simple project where you:</text:p>
      <text:list text:style-name="L16">
        <text:list-item>
          <text:p text:style-name="P39">Create a notes directory,</text:p>
        </text:list-item>
        <text:list-item>
          <text:p text:style-name="P39">Add/view notes,</text:p>
        </text:list-item>
        <text:list-item>
          <text:p text:style-name="P39">Backup your notes,</text:p>
        </text:list-item>
        <text:list-item>
          <text:p text:style-name="P39">Check system/storage info,</text:p>
        </text:list-item>
        <text:list-item>
          <text:p text:style-name="P39">Automate it with a bash script.</text:p>
        </text:list-item>
      </text:list>
      <text:p text:style-name="P28"/>
      <text:p text:style-name="P28">🔹 <text:span text:style-name="T5">Step 1: Setup Workspace</text:span></text:p>
      <text:p text:style-name="P28"/>
      <text:p text:style-name="P40"><text:s text:c="21"/><text:span text:style-name="T6">mkdir ~/notes_project</text:span></text:p>
      <text:p text:style-name="P40"><text:s text:c="21"/><text:span text:style-name="T6">cd ~/notes_project</text:span></text:p>
      <text:p text:style-name="P40"><text:s text:c="21"/><text:span text:style-name="T6">pwd</text:span></text:p>
      <text:p text:style-name="P28"><text:span text:style-name="T7">“ </text:span><text:span text:style-name="T8">~ </text:span><text:span text:style-name="T7">” </text:span><text:span text:style-name="T4">what it means?</text:span></text:p>
      <text:p text:style-name="P41">👉 Commands: <text:span text:style-name="Source_20_Text">mkdir</text:span>, <text:span text:style-name="Source_20_Text">cd</text:span>, <text:span text:style-name="Source_20_Text">pwd</text:span>, <text:span text:style-name="Source_20_Text">ls</text:span></text:p>
      <text:p text:style-name="P41"><text:span text:style-name="Source_20_Text"/></text:p>
      <text:p text:style-name="P41">🔹<text:span text:style-name="T5"> Step 2: Create Notes</text:span></text:p>
      <text:p text:style-name="P41"><text:s text:c="19"/></text:p>
      <text:p text:style-name="P41"><text:s text:c="20"/>touch note1.txt <text:s/>note2.txt</text:p>
      <text:p text:style-name="P41"><text:s text:c="20"/>ls -l</text:p>
      <text:p text:style-name="P41">👉 Commands: <text:span text:style-name="Source_20_Text">touch</text:span>, <text:span text:style-name="Source_20_Text">ls</text:span></text:p>
      <text:p text:style-name="P28"/>
      <text:p text:style-name="P28"><text:soft-page-break/>🔹<text:span text:style-name="T5"> Step 3: Write &amp; View Notes</text:span></text:p>
      <text:p text:style-name="P28"/>
      <text:p text:style-name="P28"><text:s text:c="27"/>echo "My first note on Linux" &gt; note1.txt</text:p>
      <text:p text:style-name="P28"><text:s text:c="27"/>cat note1.txt</text:p>
      <text:p text:style-name="P28"><text:s text:c="26"/>less note1.txt</text:p>
      <text:p text:style-name="P28">👉 Commands: <text:span text:style-name="Source_20_Text">echo</text:span>, <text:span text:style-name="Source_20_Text">cat</text:span>, <text:span text:style-name="Source_20_Text">less</text:span></text:p>
      <text:p text:style-name="P28"><text:span text:style-name="Source_20_Text"/></text:p>
      <text:p text:style-name="P28"><text:span text:style-name="Source_20_Text"><text:span text:style-name="T5">🔹 Step 4: Organize Notes</text:span></text:span></text:p>
      <text:p text:style-name="P28"><text:span text:style-name="Source_20_Text"/></text:p>
      <text:p text:style-name="P28"><text:span text:style-name="Source_20_Text"><text:s text:c="11"/>mkdir old_notes</text:span></text:p>
      <text:p text:style-name="P28"><text:span text:style-name="Source_20_Text"><text:s text:c="11"/>cp note1.txt old_notes/</text:span></text:p>
      <text:p text:style-name="P28"><text:span text:style-name="Source_20_Text"><text:s text:c="11"/>mv note2.txt old_notes/</text:span></text:p>
      <text:p text:style-name="P28"><text:span text:style-name="Source_20_Text"><text:s text:c="11"/>ls old_notes/</text:span></text:p>
      <text:p text:style-name="P28">👉 Commands: <text:span text:style-name="Source_20_Text">cp</text:span>, <text:span text:style-name="Source_20_Text">mv</text:span>, <text:span text:style-name="Source_20_Text">ls</text:span></text:p>
      <text:p text:style-name="P28"><text:span text:style-name="Source_20_Text"/></text:p>
      <text:p text:style-name="P28"><text:span text:style-name="Source_20_Text"><text:span text:style-name="T5">🔹 Step 5: Permissions Practice</text:span></text:span></text:p>
      <text:p text:style-name="P28"><text:span text:style-name="Source_20_Text"><text:s text:c="11"/></text:span></text:p>
      <text:p text:style-name="P28"><text:span text:style-name="Source_20_Text"><text:s text:c="11"/>chmod 600 note1.txt <text:s text:c="2"/># only you can read/write</text:span></text:p>
      <text:p text:style-name="P28"><text:span text:style-name="Source_20_Text"><text:s text:c="11"/>ls -l</text:span></text:p>
      <text:p text:style-name="P28"><text:span text:style-name="Source_20_Text">👉 Command: chmod</text:span></text:p>
      <text:p text:style-name="P28"><text:span text:style-name="Source_20_Text"/></text:p>
      <text:p text:style-name="P28"><text:span text:style-name="Source_20_Text"/></text:p>
      <text:p text:style-name="P28"><text:span text:style-name="Source_20_Text"><text:span text:style-name="T5">🔹 Step 6: Storage &amp; System Info</text:span></text:span></text:p>
      <text:p text:style-name="P28"><text:span text:style-name="Source_20_Text"/></text:p>
      <text:p text:style-name="P42"><text:span text:style-name="Source_20_Text"><text:s text:c="18"/>df -h <text:s text:c="7"/># check disk space</text:span></text:p>
      <text:p text:style-name="P42"><text:span text:style-name="Source_20_Text"><text:s text:c="18"/>du -sh * <text:s text:c="4"/># check size of each file/folder</text:span></text:p>
      <text:p text:style-name="P42"><text:span text:style-name="Source_20_Text"><text:s text:c="18"/>date <text:s text:c="8"/># current date/time</text:span></text:p>
      <text:p text:style-name="P42"><text:span text:style-name="Source_20_Text"><text:s text:c="18"/>whoami <text:s text:c="6"/># logged-in user </text:span></text:p>
      <text:p text:style-name="P42"><text:span text:style-name="Source_20_Text"/></text:p>
      <text:p text:style-name="P28"><text:span text:style-name="Source_20_Text"><text:s text:c="18"/></text:span></text:p>
      <text:p text:style-name="P28"><text:span text:style-name="Source_20_Text">👉 Commands: df, du, date, whoami</text:span></text:p>
      <text:p text:style-name="P28"><text:span text:style-name="Source_20_Text"/></text:p>
      <text:p text:style-name="P28"><text:span text:style-name="Source_20_Text"><text:span text:style-name="T5">🔹 Step 7: Archiving Notes</text:span></text:span></text:p>
      <text:p text:style-name="P28"><text:span text:style-name="Source_20_Text"><text:s text:c="4"/></text:span></text:p>
      <text:p text:style-name="P28"><text:span text:style-name="Source_20_Text"><text:s text:c="17"/>tar -czf notes_backup.tar.gz old_notes/</text:span></text:p>
      <text:p text:style-name="P28"><text:span text:style-name="Source_20_Text"><text:s text:c="17"/>ls -lh notes_backup.tar.gz</text:span></text:p>
      <text:p text:style-name="P28"><text:span text:style-name="Source_20_Text"/></text:p>
      <text:p text:style-name="P43"><text:span text:style-name="Source_20_Text"><text:span text:style-name="T9"><text:s text:c="11"/></text:span></text:span><text:span text:style-name="Source_20_Text">👉 Command: tar</text:span></text:p>
      <text:p text:style-name="P43"><text:span text:style-name="Source_20_Text"><text:span text:style-name="T9"/></text:span></text:p>
      <text:p text:style-name="P43"><text:span text:style-name="Source_20_Text"><text:span text:style-name="T9">🔹 Step 8: Basic Bash Script (backup_notes.sh)</text:span></text:span></text:p>
      <text:p text:style-name="P43"><text:span text:style-name="T9"><text:s text:c="23"/></text:span>Create a script to automate backup:</text:p>
      <text:p text:style-name="P43"><text:s text:c="47"/></text:p>
      <text:p text:style-name="P43"><text:s text:c="43"/>#!/bin/bash</text:p>
      <text:p text:style-name="P43"><text:s text:c="43"/># Backup script for notes</text:p>
      <text:p text:style-name="P43"/>
      <text:p text:style-name="P43"><text:s text:c="42"/>echo "Backup started at: $(date)"</text:p>
      <text:p text:style-name="P43"/>
      <text:p text:style-name="P43"><text:s text:c="41"/># Create backup</text:p>
      <text:p text:style-name="P43"><text:s text:c="41"/>tar -czf notes_backup_$(date +%F).tar.gz ~/notes_project</text:p>
      <text:p text:style-name="P43"/>
      <text:p text:style-name="P43"><text:s text:c="41"/># Check disk usage</text:p>
      <text:p text:style-name="P43"><text:s text:c="41"/>df -h &gt; disk_report.txt</text:p>
      <text:p text:style-name="P43"><text:s text:c="40"/>du -sh ~/notes_project &gt;&gt; disk_report.txt</text:p>
      <text:p text:style-name="P43"><text:soft-page-break/></text:p>
      <text:p text:style-name="P43"><text:s text:c="43"/>echo "Backup completed. Disk report saved."</text:p>
      <text:p text:style-name="P43"/>
      <text:p text:style-name="P44">save and exit script</text:p>
      <text:p text:style-name="P44"/>
      <text:p text:style-name="P45">Make it executable:</text:p>
      <text:p text:style-name="P45"/>
      <text:p text:style-name="P44">chmod +x backup_notes.sh</text:p>
      <text:p text:style-name="P44">./backup_notes.sh</text:p>
      <text:p text:style-name="P44">👉 Concepts used: <text:span text:style-name="Strong_20_Emphasis">chmod, variables, command substitution, tar, df, du, date</text:span></text:p>
      <text:p text:style-name="P44"><text:span text:style-name="Strong_20_Emphasis"/></text:p>
      <text:h text:style-name="P46" text:outline-level="1"><text:span text:style-name="Strong_20_Emphasis">🎯 What You Practiced</text:span></text:h>
      <text:list text:style-name="L17">
        <text:list-item>
          <text:p text:style-name="P47"><text:span text:style-name="Strong_20_Emphasis">Navigation</text:span> → <text:span text:style-name="Source_20_Text">cd</text:span>, <text:span text:style-name="Source_20_Text">pwd</text:span>, <text:span text:style-name="Source_20_Text">ls</text:span></text:p>
        </text:list-item>
        <text:list-item>
          <text:p text:style-name="P47"><text:span text:style-name="Strong_20_Emphasis">File/Folder Ops</text:span> → <text:span text:style-name="Source_20_Text">mkdir</text:span>, <text:span text:style-name="Source_20_Text">touch</text:span>, <text:span text:style-name="Source_20_Text">cp</text:span>, <text:span text:style-name="Source_20_Text">mv</text:span></text:p>
        </text:list-item>
        <text:list-item>
          <text:p text:style-name="P47"><text:span text:style-name="Strong_20_Emphasis">Viewing</text:span> → <text:span text:style-name="Source_20_Text">cat</text:span>, <text:span text:style-name="Source_20_Text">less</text:span></text:p>
        </text:list-item>
        <text:list-item>
          <text:p text:style-name="P47"><text:span text:style-name="Strong_20_Emphasis">Storage</text:span> → <text:span text:style-name="Source_20_Text">df</text:span>, <text:span text:style-name="Source_20_Text">du</text:span></text:p>
        </text:list-item>
        <text:list-item>
          <text:p text:style-name="P47"><text:span text:style-name="Strong_20_Emphasis">System Info</text:span> → <text:span text:style-name="Source_20_Text">date</text:span>, <text:span text:style-name="Source_20_Text">whoami</text:span></text:p>
        </text:list-item>
        <text:list-item>
          <text:p text:style-name="P47"><text:span text:style-name="Strong_20_Emphasis">Permissions</text:span> → <text:span text:style-name="Source_20_Text">chmod</text:span></text:p>
        </text:list-item>
        <text:list-item>
          <text:p text:style-name="P47"><text:span text:style-name="Strong_20_Emphasis">Archiving</text:span> → <text:span text:style-name="Source_20_Text">tar</text:span></text:p>
        </text:list-item>
        <text:list-item>
          <text:p text:style-name="P47"><text:span text:style-name="Strong_20_Emphasis">Bash scripting</text:span> → variables, command substitution, executable scripts</text:p>
        </text:list-item>
      </text:list>
      <text:p text:style-name="P44"><text:span text:style-name="Strong_20_Emphasis">🔥 By completing this Personal Notes Manager, you’ve tied together nearly all fundamental Linux skills into a single practical workflow.</text:span></text:p>
      <text:p text:style-name="P28"><text:s text:c="27"/></text:p>
      <text:h text:style-name="P29" text:outline-level="3"><text:span text:style-name="Strong_20_Emphasis">Project</text:span><text:span text:style-name="Strong_20_Emphasis"><text:span text:style-name="T10">2</text:span></text:span><text:span text:style-name="Strong_20_Emphasis">: The DevOps System Checkup &amp; Log Archive Script</text:span></text:h>
      <text:p text:style-name="P35"><text:span text:style-name="Strong_20_Emphasis">Project Goal:</text:span> You are a DevOps engineer. Your task is to create a script that gathers crucial system information, archives it, and stores it in a well-organized manner. This is a real-world task for monitoring system health.</text:p>
      <text:p text:style-name="P35"><text:span text:style-name="Strong_20_Emphasis">What you will practice:</text:span></text:p>
      <text:list text:style-name="L18">
        <text:list-item>
          <text:p text:style-name="P48"><text:span text:style-name="Strong_20_Emphasis">Navigation</text:span> (<text:span text:style-name="Source_20_Text">cd</text:span>, <text:span text:style-name="Source_20_Text">pwd</text:span>, <text:span text:style-name="Source_20_Text">ls</text:span>)</text:p>
        </text:list-item>
        <text:list-item>
          <text:p text:style-name="P48"><text:span text:style-name="Strong_20_Emphasis">File/Folder Operations</text:span> (<text:span text:style-name="Source_20_Text">mkdir</text:span>, <text:span text:style-name="Source_20_Text">touch</text:span>, <text:span text:style-name="Source_20_Text">cp</text:span>, <text:span text:style-name="Source_20_Text">mv</text:span>)</text:p>
        </text:list-item>
        <text:list-item>
          <text:p text:style-name="P48"><text:span text:style-name="Strong_20_Emphasis">File Viewing</text:span> (<text:span text:style-name="Source_20_Text">cat</text:span>, <text:span text:style-name="Source_20_Text">less</text:span>)</text:p>
        </text:list-item>
        <text:list-item>
          <text:p text:style-name="P48"><text:span text:style-name="Strong_20_Emphasis">Storage</text:span> (<text:span text:style-name="Source_20_Text">df</text:span>, <text:span text:style-name="Source_20_Text">du</text:span>)</text:p>
        </text:list-item>
        <text:list-item>
          <text:p text:style-name="P48"><text:span text:style-name="Strong_20_Emphasis">System Info</text:span> (<text:span text:style-name="Source_20_Text">date</text:span>, <text:span text:style-name="Source_20_Text">whoami</text:span>)</text:p>
        </text:list-item>
        <text:list-item>
          <text:p text:style-name="P48"><text:span text:style-name="Strong_20_Emphasis">Permissions</text:span> (<text:span text:style-name="Source_20_Text">chmod</text:span>)</text:p>
        </text:list-item>
        <text:list-item>
          <text:p text:style-name="P48"><text:span text:style-name="Strong_20_Emphasis">Archiving</text:span> (<text:span text:style-name="Source_20_Text">tar</text:span>)</text:p>
        </text:list-item>
        <text:list-item>
          <text:p text:style-name="P48"><text:span text:style-name="Strong_20_Emphasis">Basic Bash Scripting</text:span></text:p>
        </text:list-item>
      </text:list>
      <text:h text:style-name="P29" text:outline-level="3"><text:soft-page-break/><text:span text:style-name="Strong_20_Emphasis">Project Steps</text:span></text:h>
      <text:p text:style-name="P49"><text:span text:style-name="Strong_20_Emphasis"/></text:p>
      <text:p text:style-name="P50"><text:span text:style-name="Strong_20_Emphasis"><text:span text:style-name="T11">NOTE: this is you task like homework do it yourself</text:span></text:span></text:p>
      <text:h text:style-name="P51" text:outline-level="4"><text:span text:style-name="Strong_20_Emphasis">Step 1: Setup and Navigation</text:span></text:h>
      <text:list text:style-name="L19">
        <text:list-item>
          <text:p text:style-name="P52"><text:span text:style-name="Strong_20_Emphasis">Navigate</text:span> to your home directory and create a new project folder.</text:p>
        </text:list-item>
      </text:list>
      <text:h text:style-name="P51" text:outline-level="4"><text:span text:style-name="Strong_20_Emphasis">Step 2: Gathering System Information (Manual Checks)</text:span></text:h>
      <text:list text:style-name="L20">
        <text:list-header>
          <text:p text:style-name="P53"/>
        </text:list-header>
      </text:list>
      <text:h text:style-name="P51" text:outline-level="4"><text:span text:style-name="Strong_20_Emphasis">Step 3: Working with Logs (A Common DevOps Task)</text:span></text:h>
      <text:list text:style-name="L21">
        <text:list-header>
          <text:p text:style-name="P54"/>
        </text:list-header>
      </text:list>
      <text:h text:style-name="P51" text:outline-level="4"><text:span text:style-name="Strong_20_Emphasis">Step 4: Archiving and Permissions</text:span></text:h>
      <text:list text:style-name="L22">
        <text:list-header>
          <text:p text:style-name="P55"/>
        </text:list-header>
      </text:list>
      <text:h text:style-name="P51" text:outline-level="4"><text:span text:style-name="Strong_20_Emphasis">Step 5: The Grand Finale - Create the Script</text:span></text:h>
      <text:list text:style-name="L23">
        <text:list-header>
          <text:p text:style-name="P56"/>
        </text:list-header>
      </text:list>
      <text:list text:style-name="L24">
        <text:list-item>
          <text:p text:style-name="P57"><text:span text:style-name="Strong_20_Emphasis">Save</text:span> the file (<text:span text:style-name="Source_20_Text">Ctrl+O</text:span>, <text:span text:style-name="Source_20_Text">Enter</text:span> in nano) and exit (<text:span text:style-name="Source_20_Text">Ctrl+X</text:span>).</text:p>
        </text:list-item>
      </text:list>
      <text:list text:style-name="L25">
        <text:list-item>
          <text:p text:style-name="P58"><text:span text:style-name="Strong_20_Emphasis">Make the script executable</text:span> (Change its mode!).</text:p>
        </text:list-item>
      </text:list>
      <text:list text:style-name="L26">
        <text:list-item>
          <text:p text:style-name="P59"><text:span text:style-name="Strong_20_Emphasis">Run your script!</text:span></text:p>
        </text:list-item>
      </text:list>
      <text:h text:style-name="P32" text:outline-level="3"><text:span text:style-name="Strong_20_Emphasis">How to Use This as a Refresher:</text:span></text:h>
      <text:p text:style-name="P35">Once a week, or whenever you feel rusty:</text:p>
      <text:list text:style-name="L27">
        <text:list-item>
          <text:p text:style-name="P60"/>
        </text:list-item>
      </text:list>
      <text:p text:style-name="P35">To practice the commands manually, and start the entire project from <text:span text:style-name="Strong_20_Emphasis">Step 1</text:span> again. This is your personal practice lab!</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2T07:43:49.754052391</meta:creation-date>
    <meta:generator>LibreOffice/25.2.5.2$Linux_X86_64 LibreOffice_project/fb4792146257752f54eab576deb869869b108571</meta:generator>
    <dc:date>2025-09-02T09:02:11.359144292</dc:date>
    <meta:editing-duration>PT1H18M18S</meta:editing-duration>
    <meta:editing-cycles>14</meta:editing-cycles>
    <meta:document-statistic meta:table-count="1" meta:image-count="0" meta:object-count="0" meta:page-count="10" meta:paragraph-count="272" meta:word-count="2030" meta:character-count="13243" meta:non-whitespace-character-count="10578"/>
  </office:meta>
</office:document-meta>
</file>